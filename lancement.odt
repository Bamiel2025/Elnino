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vercel.com/amiels-projects-eb9d436b/elnino/3dn2FY4dM1bzBrenxK4aVcSiQUiV" text:style-name="Internet_20_link" text:visited-style-name="Visited_20_Internet_20_Link">https://vercel.com/amiels-projects-eb9d436b/elnino/3dn2FY4dM1bzBrenxK4aVcSiQUiV</text:a></text:p>
      <text:p text:style-name="Standard"/>
      <text:p text:style-name="Standard"/>
      <text:p text:style-name="Standard">D:\ProjetIA\ProjetIA\ElNino2&gt; <text:s/>npm run dev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2T19:53:57.889000000</meta:creation-date>
    <dc:date>2026-05-12T22:46:45.524000000</dc:date>
    <meta:editing-duration>PT5M6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" meta:word-count="5" meta:character-count="121" meta:non-whitespace-character-count="117"/>
  </office:meta>
</office:document-meta>
</file>