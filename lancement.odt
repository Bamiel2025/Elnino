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:\ProjetIA\ProjetIA\ElNino2&gt; <text:s/>npm run dev</text:p>
      <text:p text:style-name="Standard"/>
      <text:p text:style-name="P1">1-supprime les étiquettes : convection tropicale, circulation alizés et zone de nutriments sur l'animation (trop facile pour les élèves) et fait en sirte que les étiquettes à placer soit au premier plan pour une meilleure visibilité 2- intègre les images correspondantes (dans le dossier image) à la place des étiquettes pour les anomalies à localiser 3- prévoit un quizz sur le graphique dans analyse ovni et 4- prévoit une conclusion à rédiger sur l'impact du phénomène elnino sur le climat mondial dans l'onglet conclusion et prévoit les correction dans la partie professeur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2T19:53:57.889000000</meta:creation-date>
    <dc:date>2026-05-12T21:20:14.495000000</dc:date>
    <meta:editing-duration>PT4M55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2" meta:word-count="96" meta:character-count="620" meta:non-whitespace-character-count="524"/>
  </office:meta>
</office:document-meta>
</file>