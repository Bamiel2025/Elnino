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WPC" svg:font-family="'Segoe WPC', 'Segoe UI', sans-serif"/>
  </office:font-face-decls>
  <office:automatic-styles>
    <style:style style:name="T1" style:family="text">
      <style:text-properties fo:font-variant="normal" fo:text-transform="none" fo:color="#cccccc" loext:opacity="100%" style:font-name="Segoe WPC"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k c'est mieux supprime maintenant cycle de walker et voir reference sur la simulation et ajoute une fonction plein ecran et améliore la disposition de la carte pour mieux voir le titre et améliore la position des onglets pour les évènement et ajoute aussi une fonction plein ecran pour la car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WPC" svg:font-family="'Segoe WPC', 'Segoe 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12T12:57:42.921000000</meta:creation-date>
    <dc:date>2026-05-12T12:58:11.321000000</dc:date>
    <meta:editing-duration>PT28S</meta:editing-duration>
    <meta:editing-cycles>1</meta:editing-cycles>
    <meta:document-statistic meta:table-count="0" meta:image-count="0" meta:object-count="0" meta:page-count="1" meta:paragraph-count="1" meta:word-count="51" meta:character-count="296" meta:non-whitespace-character-count="245"/>
    <meta:generator>LibreOffice/24.2.3.2$Windows_X86_64 LibreOffice_project/433d9c2ded56988e8a90e6b2e771ee4e6a5ab2ba</meta:generator>
  </office:meta>
</office:document-meta>
</file>