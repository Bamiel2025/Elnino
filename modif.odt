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</office:font-face-decls>
  <office:automatic-styles>
    <style:style style:name="T1" style:family="text">
      <style:text-properties officeooo:rsid="0006a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intègre l'animation du dossier simulationelnino à la place des images pour l'onglet simulation et intègre le dossier carteconsequences à la place de l'image de la carte pour l'onglet <text:span text:style-name="T1">impact à la place de la carte des conséquences</text:span> mais intègre toujours les photos des conséquences avec une fonction agrandi<text:span text:style-name="T1">r</text:span> pour les images <text:span text:style-name="T1">afin d’améliorer la localisation de toutes les étiquettes dans les deux cas. Pousse ensuite les modifications sur mon repo github proprem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2T12:57:42.921000000</meta:creation-date>
    <dc:date>2026-05-15T14:01:17.723000000</dc:date>
    <meta:editing-duration>PT10M48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" meta:word-count="72" meta:character-count="464" meta:non-whitespace-character-count="392"/>
  </office:meta>
</office:document-meta>
</file>